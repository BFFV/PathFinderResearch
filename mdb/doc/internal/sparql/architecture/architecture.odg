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mic Code" svg:font-family="'Comic Code'" style:font-adornments="Regular" style:font-pitch="fixed"/>
    <style:font-face style:name="Comic Code1" svg:font-family="'Comic Code'" style:font-pitch="fixed"/>
    <style:font-face style:name="Comic Code2" svg:font-family="'Comic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dee6ef" draw:textarea-horizontal-align="justify" draw:textarea-vertical-align="middle" draw:auto-grow-height="false" fo:min-height="0.729cm" fo:min-width="5.91cm" style:writing-mode="lr-tb"/>
      <style:paragraph-properties style:writing-mode="lr-tb"/>
    </style:style>
    <style:style style:name="gr2" style:family="graphic" style:parent-style-name="standard">
      <style:graphic-properties svg:stroke-color="#729fcf" draw:fill-color="#dee6ef" draw:textarea-horizontal-align="justify" draw:textarea-vertical-align="middle" draw:auto-grow-height="false" fo:min-height="1.442cm" fo:min-width="6.719cm" style:writing-mode="lr-tb"/>
      <style:paragraph-properties style:writing-mode="lr-tb"/>
    </style:style>
    <style:style style:name="gr3" style:family="graphic" style:parent-style-name="objectwithoutfill">
      <style:graphic-properties svg:stroke-color="#729fcf" draw:marker-end="Arrowheads_20_8" draw:marker-end-width="0.3cm" draw:fill="none" draw:fill-color="#dee6ef" draw:textarea-vertical-align="middle"/>
      <style:paragraph-properties style:writing-mode="lr-tb"/>
    </style:style>
    <style:style style:name="gr4" style:family="graphic" style:parent-style-name="standard">
      <style:graphic-properties svg:stroke-color="#729fcf" draw:fill-color="#dee6ef" draw:textarea-horizontal-align="justify" draw:textarea-vertical-align="middle" draw:auto-grow-height="false" fo:min-height="2.979cm" fo:min-width="9.944cm" style:writing-mode="lr-tb"/>
      <style:paragraph-properties style:writing-mode="lr-tb"/>
    </style:style>
    <style:style style:name="gr5" style:family="graphic" style:parent-style-name="objectwithoutfill">
      <style:graphic-properties svg:stroke-color="#729fcf" draw:marker-end="Arrowheads_20_9" draw:marker-end-width="0.3cm" draw:fill="none" draw:fill-color="#dee6ef" draw:textarea-vertical-align="middle"/>
      <style:paragraph-properties style:writing-mode="lr-tb"/>
    </style:style>
    <style:style style:name="gr6" style:family="graphic" style:parent-style-name="standard">
      <style:graphic-properties svg:stroke-color="#729fcf" draw:fill-color="#dee6ef" draw:textarea-horizontal-align="justify" draw:textarea-vertical-align="middle" draw:auto-grow-height="false" fo:min-height="1.351cm" fo:min-width="9.124cm" style:writing-mode="lr-tb"/>
      <style:paragraph-properties style:writing-mode="lr-tb"/>
    </style:style>
    <style:style style:name="gr7" style:family="graphic" style:parent-style-name="objectwithoutfill">
      <style:graphic-properties svg:stroke-color="#729fcf" draw:marker-end="Arrowheads_20_10" draw:marker-end-width="0.3cm" draw:fill="none" draw:fill-color="#dee6ef" draw:textarea-vertical-align="middle"/>
      <style:paragraph-properties style:writing-mode="lr-tb"/>
    </style:style>
    <style:style style:name="gr8" style:family="graphic" style:parent-style-name="standard">
      <style:graphic-properties svg:stroke-color="#729fcf" draw:fill-color="#dee6ef" draw:textarea-horizontal-align="justify" draw:textarea-vertical-align="middle" draw:auto-grow-height="false" fo:min-height="1.438cm" fo:min-width="2.694cm" style:writing-mode="lr-tb"/>
      <style:paragraph-properties style:writing-mode="lr-tb"/>
    </style:style>
    <style:style style:name="gr9" style:family="graphic" style:parent-style-name="objectwithoutfill">
      <style:graphic-properties svg:stroke-color="#729fcf" draw:marker-end="Arrowheads_20_11" draw:marker-end-width="0.3cm" draw:fill="none" draw:fill-color="#dee6ef" draw:textarea-vertical-align="middle"/>
      <style:paragraph-properties style:writing-mode="lr-tb"/>
    </style:style>
    <style:style style:name="gr10" style:family="graphic" style:parent-style-name="standard">
      <style:graphic-properties svg:stroke-color="#729fcf" draw:fill="none" draw:fill-color="#dee6ef" draw:textarea-vertical-align="middle" draw:auto-grow-height="false" fo:min-height="4.821cm" fo:min-width="0cm" fo:wrap-option="wrap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965cm"/>
      <style:paragraph-properties style:writing-mode="lr-tb"/>
    </style:style>
    <style:style style:name="gr12" style:family="graphic" style:parent-style-name="standard">
      <style:graphic-properties svg:stroke-color="#729fcf" draw:fill="none" draw:fill-color="#dee6ef" draw:textarea-vertical-align="middle" draw:auto-grow-height="false" fo:min-height="3.676cm" fo:min-width="0cm" fo:wrap-option="wrap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915cm"/>
      <style:paragraph-properties style:writing-mode="lr-tb"/>
    </style:style>
    <style:style style:name="gr14" style:family="graphic" style:parent-style-name="standard">
      <style:graphic-properties svg:stroke-color="#729fcf" draw:fill="none" draw:fill-color="#dee6ef" draw:textarea-vertical-align="middle" draw:auto-grow-height="false" fo:min-height="4.633cm" fo:min-width="0cm" fo:wrap-option="wrap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952cm"/>
      <style:paragraph-properties style:writing-mode="lr-tb"/>
    </style:style>
    <style:style style:name="gr16" style:family="graphic" style:parent-style-name="standard">
      <style:graphic-properties svg:stroke-color="#729fcf" draw:fill="none" draw:fill-color="#dee6ef" draw:textarea-vertical-align="middle" draw:auto-grow-height="false" fo:min-height="6.163cm" fo:min-width="0cm" fo:wrap-option="wrap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765cm"/>
      <style:paragraph-properties style:writing-mode="lr-tb"/>
    </style:style>
    <style:style style:name="P1" style:family="paragraph">
      <style:paragraph-properties fo:text-align="center"/>
      <style:text-properties style:font-name="Comic Code" fo:font-size="12pt" fo:font-weight="normal"/>
    </style:style>
    <style:style style:name="P2" style:family="paragraph">
      <loext:graphic-properties draw:fill-color="#dee6ef"/>
      <style:paragraph-properties fo:text-align="center" style:writing-mode="lr-tb"/>
      <style:text-properties style:font-name="Comic Code" fo:font-size="12pt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dee6ef"/>
      <style:paragraph-properties fo:text-align="center"/>
      <style:text-properties style:font-name="Comic Code" fo:font-size="12pt" fo:font-weight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Comic Code" fo:font-size="12pt" fo:font-weight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Comic Code" fo:font-size="12pt" fo:font-weight="normal"/>
    </style:style>
    <style:style style:name="T1" style:family="text">
      <style:text-properties style:font-name="Comic Code" fo:font-size="12pt" fo:font-weight="normal"/>
    </style:style>
    <style:style style:name="T2" style:family="text">
      <style:text-properties style:font-name="Comic Code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514cm" svg:height="1.083cm" svg:x="5.187cm" svg:y="1.005cm">
          <text:p text:style-name="P1"><text:span text:style-name="T1">std::string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7.401cm" svg:height="1.874cm" svg:x="4.747cm" svg:y="11.113cm">
          <text:p text:style-name="P1"><text:span text:style-name="T1">logical_plan</text:span></text:p>
          <text:p text:style-name="P1"><text:span text:style-name="T1"><text:s/></text:span><text:span text:style-name="T1">std::unique_ptr&lt;Op&gt;</text:span></text:p>
          <text:p text:style-name="P1"><text:span text:style-name="T1">std::unique_ptr&lt;Exp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8.443cm" svg:y1="6.984cm" svg:x2="8.447cm" svg:y2="11.113cm" draw:start-shape="id1" draw:start-glue-point="2" draw:end-shape="id2" svg:d="M8443 6984c0 3097 4 1033 4 4129" svg:viewBox="0 0 5 4130">
          <text:p text:style-name="P3"><text:span text:style-name="T1">SPARQL::QueryVisitor</text:span></text:p>
        </draw:connector>
        <draw:custom-shape draw:style-name="gr4" draw:text-style-name="P2" xml:id="id3" draw:id="id3" draw:layer="layout" svg:width="10.792cm" svg:height="3.577cm" svg:x="3.027cm" svg:y="18.142cm">
          <text:p text:style-name="P1"><text:span text:style-name="T1">physical_plan</text:span></text:p>
          <text:p text:style-name="P1"><text:span text:style-name="T1">std::unique_ptr&lt;QueryExecutor&gt;</text:span></text:p>
          <text:p text:style-name="P5"><text:span text:style-name="T1">std::unique_ptr&lt;BindingIdIter&gt;</text:span></text:p>
          <text:p text:style-name="P5"><text:span text:style-name="T1">std::unique_ptr&lt;BindingIdExp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8.447cm" svg:y1="12.987cm" svg:x2="8.423cm" svg:y2="18.142cm" draw:start-shape="id2" draw:end-shape="id3" svg:d="M8447 12987c0 3867-24 1290-24 5155" svg:viewBox="0 0 25 5156">
          <text:p text:style-name="P3"><text:span text:style-name="T1">SPARQL::BindingIterVisitor</text:span></text:p>
          <text:p text:style-name="P3"><text:span text:style-name="T1">SPARQL::BindingIdIterVisitor</text:span></text:p>
          <text:p text:style-name="P3"><text:span text:style-name="T1">SPARQL::Expr2BindingIdExpr</text:span></text:p>
        </draw:connector>
        <draw:custom-shape draw:style-name="gr6" draw:text-style-name="P2" xml:id="id1" draw:id="id1" draw:layer="layout" svg:width="9.796cm" svg:height="1.773cm" svg:x="3.545cm" svg:y="5.211cm">
          <text:p text:style-name="P1"><text:span text:style-name="T1">AST</text:span></text:p>
          <text:p text:style-name="P1"><text:span text:style-name="T1">SparqlParser::QueryContext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8.444cm" svg:y1="2.088cm" svg:x2="8.443cm" svg:y2="5.211cm" draw:start-shape="id4" draw:start-glue-point="2" draw:end-shape="id1" svg:d="M8444 2088c0 2341-1 780-1 3123" svg:viewBox="0 0 2 3124">
          <text:p text:style-name="P3"><text:span text:style-name="T1">SparqlParser</text:span></text:p>
        </draw:connector>
        <draw:custom-shape draw:style-name="gr8" draw:text-style-name="P2" xml:id="id5" draw:id="id5" draw:layer="layout" svg:width="3.376cm" svg:height="1.87cm" svg:x="6.717cm" svg:y="25.109cm">
          <text:p text:style-name="P1"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8.423cm" svg:y1="21.719cm" svg:x2="8.405cm" svg:y2="25.109cm" draw:start-shape="id3" draw:end-shape="id5" svg:d="M8423 21719c0 2542-18 848-18 3390" svg:viewBox="0 0 19 3391">
          <text:p text:style-name="P3"><text:span text:style-name="T1">begin()</text:span></text:p>
          <text:p text:style-name="P3"><text:span text:style-name="T1">next()</text:span></text:p>
          <text:p text:style-name="P3"><text:span text:style-name="T1">eval()</text:span></text:p>
          <text:p text:style-name="P3"><text:span text:style-name="T1">etc</text:span></text:p>
        </draw:connector>
        <draw:custom-shape draw:style-name="gr10" draw:text-style-name="P4" draw:layer="layout" svg:width="1.247cm" svg:height="5.349cm" svg:x="14.546cm" svg:y="7.652cm">
          <text:p/>
          <draw:enhanced-geometry svg:viewBox="0 0 21600 21600" draw:glue-points="0 0 0 21600 21600 10800" draw:text-areas="0 ?f9 7800 ?f10" draw:type="right-brace" draw:modifiers="1800 10679.4332331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7" draw:layer="layout" svg:width="2.343cm" svg:height="1.215cm" svg:x="15.87cm" svg:y="9.63cm">
          <draw:text-box>
            <text:p text:style-name="P6"><text:span text:style-name="T2">parser</text:span></text:p>
          </draw:text-box>
        </draw:frame>
        <draw:custom-shape draw:style-name="gr12" draw:text-style-name="P4" draw:layer="layout" svg:width="1.247cm" svg:height="4.234cm" svg:x="14.578cm" svg:y="13.46cm">
          <text:p/>
          <draw:enhanced-geometry svg:viewBox="0 0 21600 21600" draw:glue-points="0 0 0 21600 21600 10800" draw:text-areas="0 ?f9 7800 ?f10" draw:type="right-brace" draw:modifiers="2518.10193321617 10679.4332331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7" draw:layer="layout" svg:width="4.764cm" svg:height="1.165cm" svg:x="15.705cm" svg:y="14.926cm">
          <draw:text-box>
            <text:p text:style-name="P6"><text:span text:style-name="T2">query_optimizer</text:span></text:p>
          </draw:text-box>
        </draw:frame>
        <draw:custom-shape draw:style-name="gr14" draw:text-style-name="P4" draw:layer="layout" svg:width="1.247cm" svg:height="5.151cm" svg:x="14.546cm" svg:y="2.139cm">
          <text:p/>
          <draw:enhanced-geometry svg:viewBox="0 0 21600 21600" draw:glue-points="0 0 0 21600 21600 10800" draw:text-areas="0 ?f9 7800 ?f10" draw:type="right-brace" draw:modifiers="1800 10679.4332331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2.69cm" svg:height="1.202cm" svg:x="15.779cm" svg:y="3.729cm">
          <draw:text-box>
            <text:p text:style-name="P6"><text:span text:style-name="T2">ANTLR</text:span></text:p>
          </draw:text-box>
        </draw:frame>
        <draw:custom-shape draw:style-name="gr16" draw:text-style-name="P4" draw:layer="layout" svg:width="1.247cm" svg:height="6.765cm" svg:x="14.585cm" svg:y="18.096cm">
          <text:p/>
          <draw:enhanced-geometry svg:viewBox="0 0 21600 21600" draw:glue-points="0 0 0 21600 21600 10800" draw:text-areas="0 ?f9 7800 ?f10" draw:type="right-brace" draw:modifiers="1800 10679.4332331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7" draw:layer="layout" svg:width="3.091cm" svg:height="1.015cm" svg:x="15.764cm" svg:y="21.025cm">
          <draw:text-box>
            <text:p text:style-name="P6"><text:span text:style-name="T2">execu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mic Code" svg:font-family="'Comic Code'" style:font-adornments="Regular" style:font-pitch="fixed"/>
    <style:font-face style:name="Comic Code1" svg:font-family="'Comic Code'" style:font-pitch="fixed"/>
    <style:font-face style:name="Comic Code2" svg:font-family="'Comic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1:26:48.588334779</meta:creation-date>
    <dc:date>2023-07-26T17:33:42.716414006</dc:date>
    <meta:editing-duration>PT6H41M14S</meta:editing-duration>
    <meta:editing-cycles>5</meta:editing-cycles>
    <meta:generator>LibreOffice/7.5.5.2$Linux_X86_64 LibreOffice_project/50$Build-2</meta:generator>
    <meta:document-statistic meta:object-count="17"/>
  </office:meta>
</office:document-meta>
</file>